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 Nazanin" svg:font-family="'B Nazanin'" style:font-pitch="variable"/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paragraph-properties fo:text-align="right" style:justify-single-word="false" style:writing-mode="rl-tb" style:writing-mode-automatic="false"/>
      <style:text-properties style:font-name="B Nazanin" officeooo:rsid="000e11c7" officeooo:paragraph-rsid="000e11c7" style:font-name-complex="B Nazanin" style:font-weight-complex="bold"/>
    </style:style>
    <style:style style:name="P2" style:family="paragraph" style:parent-style-name="Standard">
      <style:paragraph-properties fo:text-align="right" style:justify-single-word="false" style:writing-mode="rl-tb" style:writing-mode-automatic="false"/>
      <style:text-properties style:font-name="B Nazanin" fo:font-weight="normal" style:font-weight-asian="normal" style:font-name-complex="B Nazanin" style:font-weight-complex="normal"/>
    </style:style>
    <style:style style:name="P3" style:family="paragraph" style:parent-style-name="Standard">
      <style:paragraph-properties fo:text-align="right" style:justify-single-word="false" style:writing-mode="rl-tb" style:writing-mode-automatic="false"/>
      <style:text-properties style:font-name="B Nazanin" fo:font-weight="bold" style:font-name-complex="B Nazanin"/>
    </style:style>
    <style:style style:name="P4" style:family="paragraph" style:parent-style-name="Standard">
      <style:paragraph-properties fo:text-align="right" style:justify-single-word="false" style:writing-mode="rl-tb" style:writing-mode-automatic="false"/>
      <style:text-properties style:font-name="B Nazanin" fo:font-style="normal" fo:font-weight="bold" officeooo:rsid="000e5b33" officeooo:paragraph-rsid="000f82e8" style:font-style-asian="normal" style:font-weight-asian="bold" style:font-name-complex="B Nazanin" style:font-style-complex="normal" style:font-weight-complex="bold"/>
    </style:style>
    <style:style style:name="P5" style:family="paragraph" style:parent-style-name="Standard" style:list-style-name="L1">
      <style:paragraph-properties fo:text-align="right" style:justify-single-word="false" style:writing-mode="rl-tb" style:writing-mode-automatic="false"/>
      <style:text-properties officeooo:paragraph-rsid="000f82e8" style:font-name-complex="B Nazanin"/>
    </style:style>
    <style:style style:name="P6" style:family="paragraph" style:parent-style-name="Standard">
      <style:paragraph-properties fo:text-align="right" style:justify-single-word="false" style:writing-mode="rl-tb" style:writing-mode-automatic="false"/>
      <style:text-properties officeooo:paragraph-rsid="000e5b33" style:font-name-complex="B Nazanin"/>
    </style:style>
    <style:style style:name="P7" style:family="paragraph" style:parent-style-name="Standard">
      <style:paragraph-properties fo:text-align="right" style:justify-single-word="false" style:writing-mode="rl-tb" style:writing-mode-automatic="false"/>
      <style:text-properties officeooo:rsid="000f82e8" officeooo:paragraph-rsid="000f82e8" style:font-name-complex="B Nazanin"/>
    </style:style>
    <style:style style:name="P8" style:family="paragraph" style:parent-style-name="Standard">
      <style:paragraph-properties fo:text-align="right" style:justify-single-word="false" style:writing-mode="rl-tb" style:writing-mode-automatic="false"/>
      <style:text-properties fo:font-weight="bold" officeooo:rsid="000f82e8" officeooo:paragraph-rsid="000f82e8" style:font-weight-asian="bold" style:font-name-complex="B Nazanin" style:font-weight-complex="bold"/>
    </style:style>
    <style:style style:name="P9" style:family="paragraph" style:parent-style-name="Standard">
      <style:paragraph-properties fo:text-align="right" style:justify-single-word="false" style:writing-mode="rl-tb" style:writing-mode-automatic="false"/>
      <style:text-properties fo:font-weight="normal" officeooo:rsid="000f82e8" officeooo:paragraph-rsid="000f82e8" style:font-weight-asian="normal" style:font-name-complex="B Nazanin" style:font-weight-complex="normal"/>
    </style:style>
    <style:style style:name="P10" style:family="paragraph" style:parent-style-name="Standard">
      <style:paragraph-properties fo:text-align="right" style:justify-single-word="false" style:writing-mode="rl-tb" style:writing-mode-automatic="false"/>
      <style:text-properties fo:font-weight="normal" officeooo:rsid="00116035" officeooo:paragraph-rsid="00116035" style:font-weight-asian="normal" style:font-name-complex="B Nazanin" style:font-weight-complex="normal"/>
    </style:style>
    <style:style style:name="P11" style:family="paragraph" style:parent-style-name="Standard">
      <style:paragraph-properties fo:text-align="right" style:justify-single-word="false" style:writing-mode="rl-tb" style:writing-mode-automatic="false"/>
      <style:text-properties fo:font-weight="bold" officeooo:rsid="00116035" officeooo:paragraph-rsid="00116035" style:font-weight-asian="bold" style:font-name-complex="B Nazanin" style:font-weight-complex="bold"/>
    </style:style>
    <style:style style:name="P12" style:family="paragraph" style:parent-style-name="Standard">
      <style:paragraph-properties fo:text-align="right" style:justify-single-word="false" style:writing-mode="rl-tb" style:writing-mode-automatic="false"/>
      <style:text-properties fo:font-weight="normal" officeooo:rsid="0012618e" officeooo:paragraph-rsid="0012618e" style:font-weight-asian="normal" style:font-name-complex="B Nazanin" style:font-weight-complex="normal"/>
    </style:style>
    <style:style style:name="P13" style:family="paragraph" style:parent-style-name="Standard">
      <style:paragraph-properties fo:text-align="right" style:justify-single-word="false" style:writing-mode="rl-tb" style:writing-mode-automatic="false"/>
      <style:text-properties style:font-name="monospace" fo:font-weight="normal" officeooo:rsid="0012618e" officeooo:paragraph-rsid="0013d60a" style:font-weight-asian="normal" style:font-name-complex="B Nazanin" style:font-weight-complex="normal"/>
    </style:style>
    <style:style style:name="P14" style:family="paragraph" style:parent-style-name="Text_20_body">
      <style:paragraph-properties fo:text-align="right" style:justify-single-word="false" style:writing-mode="rl-tb" style:writing-mode-automatic="false"/>
    </style:style>
    <style:style style:name="P15" style:family="paragraph" style:parent-style-name="Quotations">
      <style:paragraph-properties fo:margin-left="0in" fo:text-indent="0in" style:auto-text-indent="false"/>
      <style:text-properties officeooo:paragraph-rsid="0016102a"/>
    </style:style>
    <style:style style:name="P16" style:family="paragraph" style:parent-style-name="Text_20_body">
      <style:paragraph-properties fo:text-align="right" style:justify-single-word="false" style:writing-mode="rl-tb" style:writing-mode-automatic="false"/>
      <style:text-properties officeooo:rsid="0016102a" officeooo:paragraph-rsid="0016102a"/>
    </style:style>
    <style:style style:name="P17" style:family="paragraph" style:parent-style-name="Text_20_body">
      <style:paragraph-properties fo:text-align="right" style:justify-single-word="false" style:writing-mode="rl-tb" style:writing-mode-automatic="false"/>
      <style:text-properties officeooo:rsid="001977ab" officeooo:paragraph-rsid="001977ab"/>
    </style:style>
    <style:style style:name="P18" style:family="paragraph" style:parent-style-name="Text_20_body">
      <style:paragraph-properties fo:text-align="left" style:justify-single-word="false" style:writing-mode="lr-tb" style:writing-mode-automatic="false"/>
      <style:text-properties style:font-name="monospace" fo:font-size="9pt" officeooo:paragraph-rsid="001977ab" style:font-size-asian="9pt" style:font-size-complex="9pt"/>
    </style:style>
    <style:style style:name="P19" style:family="paragraph" style:parent-style-name="Text_20_body">
      <style:paragraph-properties fo:text-align="right" style:justify-single-word="false" style:writing-mode="rl-tb" style:writing-mode-automatic="false"/>
      <style:text-properties style:font-name="monospace" officeooo:rsid="001977ab" officeooo:paragraph-rsid="001977ab"/>
    </style:style>
    <style:style style:name="P20" style:family="paragraph" style:parent-style-name="Text_20_body">
      <style:paragraph-properties fo:text-align="left" style:justify-single-word="false" style:writing-mode="lr-tb" style:writing-mode-automatic="false"/>
      <style:text-properties style:font-name="monospace" officeooo:rsid="001977ab" officeooo:paragraph-rsid="001977ab"/>
    </style:style>
    <style:style style:name="P21" style:family="paragraph" style:parent-style-name="Standard">
      <style:paragraph-properties fo:margin-left="0in" fo:margin-right="0in" style:line-height-at-least="0.2083in" fo:text-indent="0in" style:auto-text-indent="false"/>
      <style:text-properties fo:color="#000000" loext:opacity="100%" style:font-name="Droid Sans Mono" fo:font-size="7pt" fo:font-weight="normal" fo:background-color="transparent" style:font-size-asian="7pt" style:font-size-complex="7pt"/>
    </style:style>
    <style:style style:name="P22" style:family="paragraph" style:parent-style-name="Standard">
      <style:paragraph-properties style:line-height-at-least="0.2083in"/>
      <style:text-properties fo:color="#000000" loext:opacity="100%" style:font-name="Droid Sans Mono" fo:font-size="7pt" fo:font-style="italic" fo:font-weight="normal" fo:background-color="transparent" style:font-size-asian="7pt" style:font-size-complex="7pt"/>
    </style:style>
    <style:style style:name="P23" style:family="paragraph" style:parent-style-name="Standard">
      <style:paragraph-properties style:line-height-at-least="0.2083in"/>
      <style:text-properties fo:color="#000000" loext:opacity="100%" style:font-name="Droid Sans Mono" fo:font-size="7pt" fo:font-style="italic" fo:font-weight="normal" officeooo:rsid="001977ab" fo:background-color="transparent" style:font-size-asian="7pt" style:font-size-complex="7pt"/>
    </style:style>
    <style:style style:name="P24" style:family="paragraph" style:parent-style-name="Standard">
      <style:paragraph-properties style:line-height-at-least="0.2083in"/>
      <style:text-properties fo:color="#000000" loext:opacity="100%" fo:font-size="7pt" fo:background-color="transparent" style:font-size-asian="7pt" style:font-size-complex="7pt"/>
    </style:style>
    <style:style style:name="P25" style:family="paragraph" style:parent-style-name="Standard">
      <style:paragraph-properties style:line-height-at-least="0.2083in"/>
      <style:text-properties fo:color="#000000" loext:opacity="100%" style:font-name="Droid Sans Mono" fo:font-size="7pt" fo:font-weight="normal" fo:background-color="transparent" style:font-size-asian="7pt" style:font-size-complex="7pt"/>
    </style:style>
    <style:style style:name="P26" style:family="paragraph" style:parent-style-name="Standard">
      <style:paragraph-properties fo:margin-top="0in" fo:margin-bottom="0.1965in" style:contextual-spacing="false" style:line-height-at-least="0.2083in"/>
      <style:text-properties fo:color="#000000" loext:opacity="100%" style:font-name="Droid Sans Mono" fo:font-size="7pt" fo:font-weight="normal" officeooo:paragraph-rsid="001a806e" fo:background-color="transparent" style:font-size-asian="7pt" style:font-size-complex="7pt"/>
    </style:style>
    <style:style style:name="P27" style:family="paragraph" style:parent-style-name="Standard">
      <style:paragraph-properties fo:margin-top="0in" fo:margin-bottom="0.1965in" style:contextual-spacing="false" style:line-height-at-least="0.2083in"/>
      <style:text-properties fo:color="#000000" loext:opacity="100%" style:font-name="Droid Sans Mono" fo:font-size="7pt" fo:font-weight="normal" fo:background-color="transparent" style:font-size-asian="7pt" style:font-size-complex="7pt"/>
    </style:style>
    <style:style style:name="P28" style:family="paragraph" style:parent-style-name="Standard">
      <style:paragraph-properties fo:margin-left="0in" fo:margin-right="0in" style:line-height-at-least="0.2083in" fo:text-indent="0in" style:auto-text-indent="false"/>
      <style:text-properties fo:font-variant="normal" fo:text-transform="none" fo:color="#000000" loext:opacity="100%" style:font-name="Droid Sans Mono" fo:font-size="11.25pt" fo:letter-spacing="normal" fo:font-style="normal" fo:font-weight="normal" fo:background-color="#00a933" style:font-size-asian="7pt" style:font-size-complex="7pt"/>
    </style:style>
    <style:style style:name="P29" style:family="paragraph" style:parent-style-name="Standard">
      <style:paragraph-properties fo:margin-top="0in" fo:margin-bottom="0.1965in" style:contextual-spacing="false" style:line-height-at-least="0.2083in"/>
      <style:text-properties fo:color="#000000" loext:opacity="100%" fo:background-color="transparent"/>
    </style:style>
    <style:style style:name="P30" style:family="paragraph" style:parent-style-name="Standard">
      <style:paragraph-properties fo:margin-top="0in" fo:margin-bottom="0.1965in" style:contextual-spacing="false" style:line-height-at-least="0.2083in"/>
      <style:text-properties fo:color="#000000" loext:opacity="100%" style:font-name="Droid Sans Mono" fo:font-size="11.25pt" officeooo:rsid="001ebb98" fo:background-color="#00a933" loext:padding="0.0193in" loext:border="0.74pt solid #007fd4"/>
    </style:style>
    <style:style style:name="T1" style:family="text">
      <style:text-properties officeooo:rsid="0012618e"/>
    </style:style>
    <style:style style:name="T2" style:family="text">
      <style:text-properties officeooo:rsid="000e11c7"/>
    </style:style>
    <style:style style:name="T3" style:family="text">
      <style:text-properties officeooo:rsid="00116035"/>
    </style:style>
    <style:style style:name="T4" style:family="text">
      <style:text-properties officeooo:rsid="00121e3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loext:opacity="100%" fo:font-size="8pt" fo:background-color="#ffffff" loext:char-shading-value="0" style:font-size-asian="8pt" style:font-size-complex="8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officeooo:rsid="0013d60a"/>
    </style:style>
    <style:style style:name="T9" style:family="text">
      <style:text-properties officeooo:rsid="002047f3"/>
    </style:style>
    <style:style style:name="T10" style:family="text">
      <style:text-properties fo:color="#18b218" loext:opacity="100%" officeooo:rsid="001977ab" fo:background-color="#ffffff" loext:char-shading-value="0"/>
    </style:style>
    <style:style style:name="T11" style:family="text">
      <style:text-properties fo:color="#000000" loext:opacity="100%" officeooo:rsid="001977ab" fo:background-color="#ffffff" loext:char-shading-value="0"/>
    </style:style>
    <style:style style:name="T12" style:family="text">
      <style:text-properties fo:color="#000000" loext:opacity="100%" style:text-underline-style="solid" style:text-underline-width="auto" style:text-underline-color="font-color" officeooo:rsid="001977ab" fo:background-color="#ffffff" loext:char-shading-value="0"/>
    </style:style>
    <style:style style:name="T13" style:family="text">
      <style:text-properties officeooo:rsid="001977ab"/>
    </style:style>
    <style:style style:name="T14" style:family="text">
      <style:text-properties fo:color="#18b218" loext:opacity="100%" fo:background-color="#ffffff" loext:char-shading-value="0"/>
    </style:style>
    <style:style style:name="T15" style:family="text">
      <style:text-properties fo:color="#000000" loext:opacity="100%" fo:background-color="#ffffff" loext:char-shading-value="0"/>
    </style:style>
    <style:style style:name="T16" style:family="text">
      <style:text-properties fo:color="#000000" loext:opacity="100%" style:text-underline-style="solid" style:text-underline-width="auto" style:text-underline-color="font-color" fo:background-color="#ffffff" loext:char-shading-value="0"/>
    </style:style>
    <style:style style:name="T17" style:family="text">
      <style:text-properties fo:font-size="9pt" officeooo:rsid="001d7de7" style:font-size-asian="9pt" style:font-size-complex="9pt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color="#000000" loext:opacity="100%" style:font-name="Droid Sans Mono" fo:font-size="9pt" fo:font-weight="bold" fo:background-color="transparent" loext:char-shading-value="0" style:font-size-asian="9pt" style:font-size-complex="9pt"/>
    </style:style>
    <style:style style:name="T20" style:family="text">
      <style:text-properties fo:color="#000000" loext:opacity="100%" style:font-name="Droid Sans Mono" fo:font-size="9pt" fo:font-weight="normal" fo:background-color="transparent" loext:char-shading-value="0" style:font-size-asian="9pt" style:font-size-complex="9pt"/>
    </style:style>
    <style:style style:name="T21" style:family="text">
      <style:text-properties fo:font-weight="bold"/>
    </style:style>
    <style:style style:name="T22" style:family="text">
      <style:text-properties fo:font-style="italic" officeooo:rsid="001977ab"/>
    </style:style>
    <style:style style:name="T23" style:family="text">
      <style:text-properties fo:font-style="italic" fo:font-weight="bold" officeooo:rsid="001977ab"/>
    </style:style>
    <style:style style:name="T24" style:family="text">
      <style:text-properties style:font-name="Droid Sans Mono" fo:font-size="7pt" fo:font-style="italic" fo:font-weight="normal" officeooo:rsid="001977ab" style:font-size-asian="7pt" style:font-size-complex="7pt"/>
    </style:style>
    <style:style style:name="T25" style:family="text">
      <style:text-properties style:font-name="Droid Sans Mono" fo:font-size="7pt" fo:font-style="italic" fo:font-weight="bold" officeooo:rsid="001977ab" style:font-size-asian="7pt" style:font-size-complex="7pt"/>
    </style:style>
    <style:style style:name="T26" style:family="text">
      <style:text-properties style:font-name="Droid Sans Mono" fo:font-size="7pt" fo:font-weight="normal" style:font-size-asian="7pt" style:font-size-complex="7pt"/>
    </style:style>
    <style:style style:name="T27" style:family="text">
      <style:text-properties style:font-name="Droid Sans Mono" fo:font-size="11.25pt" fo:background-color="#00a933" loext:char-shading-value="0" loext:padding="0.0193in" loext:border="0.74pt solid #007fd4"/>
    </style:style>
    <style:style style:name="T28" style:family="text">
      <style:text-properties style:font-name="Droid Sans Mono" fo:font-size="11.25pt" loext:padding="0.0193in" loext:border="0.74pt solid #007fd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روز اول:</text:p>
      <text:p text:style-name="P1">تسک <text:span text:style-name="T1">فرازنده</text:span> و حسنی بررسی ابزارهای زیر:</text:p>
      <text:p text:style-name="P2">اتصال به آلل‌های HLA، پردازش پروتئازوم، انتقال TAP، ایمونوژنیسیتی : MHCflurry، NetMHCpan<text:line-break/>تعامل پروتئین با BCR و TLR-4 <text:span text:style-name="T2">با: </text:span>DiffDock<text:line-break/>حفاظت شدگی در دیگر سویهها : MSA Transformer<text:line-break/>داینامیک پروتئین : RoseTTAFold2<text:line-break/>تغییرات پس از ترجمه : ProtTrans<text:line-break/>فراوانی پروتئین در سویهها : Enformer</text:p>
      <text:p text:style-name="P3"/>
      <text:p text:style-name="P4">جواب به سوالات زیر برای هر ابزار:</text:p>
      <text:list text:style-name="L1">
        <text:list-item>
          <text:p text:style-name="P5">رایگان هست یا نیست؟</text:p>
        </text:list-item>
        <text:list-item>
          <text:p text:style-name="P5">چگونه در محیط لوکال اجرا میشود؟</text:p>
        </text:list-item>
        <text:list-item>
          <text:p text:style-name="P5">دقیقا چه کاری انجام میدهد؟</text:p>
        </text:list-item>
        <text:list-item>
          <text:p text:style-name="P5">خروجی آن دقیقا چیست؟</text:p>
        </text:list-item>
        <text:list-item>
          <text:p text:style-name="P5">ورودی آن دقیقا چیست؟</text:p>
        </text:list-item>
      </text:list>
      <text:p text:style-name="P6"/>
      <text:p text:style-name="P7">همچنین گیتهاب ابزار Prokka مطالعه شد <text:span text:style-name="T3">و سعی بر نصب ان از طریق conda و docker داشتیم اما اینترنت اختلال داشت.</text:span></text:p>
      <text:p text:style-name="P6"/>
      <text:p text:style-name="P8">روز دوم:</text:p>
      <text:p text:style-name="P9">یک فایل شامل پاسخ به سوالات روز قبل تهیه شده بود و بررسی شد. پاسخ به سوالات ۲ و ۴ و ۵ کامل و شفاف نبود فلذا باید تصحیح میشدند. اینترنت وضعیت مطلوبی نداشت و بخشی قابل توجهی به درست کردن آن پرداخته شد.</text:p>
      <text:p text:style-name="P10">صفحه github ابزار ESM-C مطالعه شد و به دلیل اختلال اینرنت موفق به نصب ان از طریق pip نشدیم.</text:p>
      <text:p text:style-name="P10"/>
      <text:p text:style-name="P11">روز سوم:</text:p>
      <text:p text:style-name="P10">ESM-C از طریق pip نصب شد اما Prokka همچنان نصب ن<text:span text:style-name="T4">شد.</text:span></text:p>
      <text:p text:style-name="P10"/>
      <text:p text:style-name="P12"><text:span text:style-name="T5">روز چهارم</text:span>:</text:p>
      <text:p text:style-name="P12">حسنی و فرازنده باید فایل KPI را کامل کنند زیرا قبلا به صورت ناقص تکمیل شده بود. همچنین گزارش جزئیات عملکردشان را باید بدهند.</text:p>
      <text:p text:style-name="P12">ابزار prokka با موفقیت نصب شد و یک خروجی تستی از ان گرفته شد. رفع مشکل نصب:</text:p>
      <text:p text:style-name="P12">conda create -n prokka -c bioconda -c conda-forge --override-channels prokka -y به جای</text:p>
      <text:p text:style-name="P12">conda create -n prokka prokka -y استفاده شد تا از کانال تحریم شده دانلود نکند. برای رفع اختلال نسخه blast از دستور زیر استفاده شد:<text:line-break/>conda install -c conda-forge -c bioconda blast=2.9.0 --override-channels -y</text:p>
      <text:p text:style-name="P12">با دستور prokka contigs.fasta خروجی تستی گرفتیم. خروجی شامل یک پوشه بود که فایلهای زیر را شامل میشد:</text:p>
      <text:p text:style-name="P13"><text:span text:style-name="T6">HAMAP.hmm.faa        PROKKA_05302026.ffn  PROKKA_05302026.gbk  PROKKA_05302026.sqn  PROKKA_05302026.txt </text:span><text:span text:style-name="T7"><text:line-break/></text:span><text:span text:style-name="T6">PROKKA_05302026.err  PROKKA_05302026.fna  PROKKA_05302026.gff  PROKKA_05302026.tbl  sprot.faa </text:span><text:span text:style-name="T7"><text:line-break/></text:span><text:span text:style-name="T6">PROKKA_05302026.faa  PROKKA_05302026.fsa  PROKKA_05302026.log  PROKKA_05302026.tsv</text:span></text:p>
      <text:p text:style-name="P14"><text:soft-page-break/><text:span text:style-name="T8">برای ساخت فایل </text:span>contigs.fasta <text:span text:style-name="T8">از دستور زیر استفاده شد تا صرفا یک فایل تستی داشته باشیم. در غیراین صورت باید </text:span><text:span text:style-name="T9">فایل fasta ژنوم دانلود شود</text:span><text:span text:style-name="T8">. </text:span><text:line-break/></text:p>
      <text:p text:style-name="Text_20_body">cat &gt; contigs.fasta &lt;&lt; 'EOF'</text:p>
      <text:p text:style-name="P15">&gt;contig_1 ATGAACGACGGTCTGCGTAAAGCTCTGGAAATGATCCCGGCAGGTTGGGGCGAAGAC GACAAACGCACCGAATTCGGCGTTGCGATCATCGACCTGATCAAAGCATGCGAAGCG <text:line-break/>&gt;contig_2 ATGAAAGTTGCAACTCTGGTTTCCGGTAACGGCGGCGTATCTCATGTTCTGCGTCAG CTGAAAGCTAAAGGTGATTACGAACTGGTGCTGATGGGTTCCTCTGGCGGTAAACCG <text:line-break/>&gt;contig_3 GTACGTGAACTCGACAGCAGCTTCGACGATTATCTGAAACGTGGCGACTTCGTTGTT ATCACCGGTGACCGTAAAGGCCAGGTTGAAATCCTGGTTGAAACCGAAATCCGTGGC<text:line-break/>EOF</text:p>
      <text:p text:style-name="Text_20_body"/>
      <text:p text:style-name="Text_20_body"/>
      <text:p text:style-name="P16">روز پنجم:</text:p>
      <text:p text:style-name="P17">اینترنت با کابل LAN برقرار شد و توانستیم مدلهای ESMC-300M و ESMC-600M را با دستورهای زیر دانلود کنیم:</text:p>
      <text:p text:style-name="P18"><text:span text:style-name="T10">huggingface-cli</text:span><text:span text:style-name="T11"> download biohub/ESMC-300M --local-dir </text:span><text:span text:style-name="T12">./ESMC-300M-CLI</text:span><text:span text:style-name="T11"> </text:span><text:span text:style-name="T13"><text:line-break/></text:span><text:span text:style-name="T14">huggingface-cli</text:span><text:span text:style-name="T15"> download biohub/ESMC-600M --local-dir </text:span><text:span text:style-name="T16">./ESMC-600M-CLI</text:span></text:p>
      <text:p text:style-name="P19">سپس با کدهای زیر از هر کدام خروجی گرفتیم:</text:p>
      <text:p text:style-name="P20"><text:span text:style-name="T17">bash → </text:span><text:span text:style-name="T18">pip install </text:span><text:a xlink:type="simple" xlink:href="mailto:esm@git" text:style-name="Internet_20_link" text:visited-style-name="Visited_20_Internet_20_Link"><text:span text:style-name="T18">esm@git</text:span></text:a><text:span text:style-name="T18">+https://github.com/Biohub/esm.git@main</text:span></text:p>
      <text:p text:style-name="Standard"><text:span text:style-name="Source_20_Text"><text:span text:style-name="T19">import</text:span></text:span><text:span text:style-name="Source_20_Text"><text:span text:style-name="T20"> torch</text:span></text:span></text:p>
      <text:p text:style-name="P21"><text:span text:style-name="T21">from</text:span> transformers <text:span text:style-name="T21">import</text:span> AutoModelForMaskedLM, AutoTokenizer</text:p>
      <text:p text:style-name="P21"><text:span text:style-name="T21">from</text:span> huggingface_hub <text:span text:style-name="T21">import</text:span> login</text:p>
      <text:p text:style-name="P21">login(token<text:span text:style-name="T21">=</text:span>'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')</text:p>
      <text:p text:style-name="P22"/>
      <text:p text:style-name="P22">dir <text:span text:style-name="T21">=</text:span> './ESMC-600M-CLI' <text:span text:style-name="T13"># or ./ESMC-300M-CLI</text:span></text:p>
      <text:p text:style-name="P23">sequences <text:span text:style-name="T21">=</text:span> ["MSKGEELFTGVVPILVELDGDVNGHKFSVSGEGEGDATYGKLTLKFICTTGKLPVPWPTLVTTFSYGVQCFSRYPDHMKQHDFFKSAMPEGYVQERTIFFKDDGNYKTRAEVKFEGDTLVNRIELKGIDFKEDGNILGHKLEYNYNSHNVYIMADKQKNGIKVNFKIRHNIEDGSVQLADHYQQNTPIGDGPVLLPDNHYLSTQSALSKDPNEKRDHMVLLEFVTAAGITHGMDELYK"]</text:p>
      <text:p text:style-name="P24"/>
      <text:p text:style-name="P21">model <text:span text:style-name="T21">=</text:span> AutoModelForMaskedLM.from_pretrained(</text:p>
      <text:p text:style-name="P21">dir, device_map<text:span text:style-name="T21">=</text:span>"auto", local_files_only<text:span text:style-name="T21">=True</text:span>).eval()</text:p>
      <text:p text:style-name="P25"/>
      <text:p text:style-name="P23">tokenizer <text:span text:style-name="T21">=</text:span> AutoTokenizer.from_pretrained(dir, local_files_only<text:span text:style-name="T21">=True</text:span>)</text:p>
      <text:p text:style-name="P26"><text:span text:style-name="T22">inputs </text:span><text:span text:style-name="T23">=</text:span><text:span text:style-name="T22"> tokenizer(sequences, return_tensors</text:span><text:span text:style-name="T23">=</text:span><text:span text:style-name="T22">"pt", padding</text:span><text:span text:style-name="T23">=True</text:span><text:span text:style-name="T22">)</text:span></text:p>
      <text:p text:style-name="P26">inputs <text:span text:style-name="T21">=</text:span> {k: v.to(model.device) <text:span text:style-name="T21">for</text:span> k, v <text:span text:style-name="T21">in</text:span> inputs.items()}</text:p>
      <text:p text:style-name="P21"><text:soft-page-break/><text:span text:style-name="T21">with</text:span> torch.inference_mode():</text:p>
      <text:p text:style-name="P21">output <text:span text:style-name="T21">=</text:span> model(<text:span text:style-name="T21">**</text:span>inputs, output_hidden_states<text:span text:style-name="T21">=True</text:span>)</text:p>
      <text:p text:style-name="P27"><text:span text:style-name="T22">logits </text:span><text:span text:style-name="T23">=</text:span><text:span text:style-name="T22"> output.logits<text:line-break/></text:span>print(logits.shape)</text:p>
      <text:p text:style-name="P28">torch.Size([1, 240, 64])</text:p>
      <text:p text:style-name="P29"><text:span text:style-name="T24">embeddings </text:span><text:span text:style-name="T25">=</text:span><text:span text:style-name="T24"> output.hidden_states[</text:span><text:span text:style-name="T25">-</text:span><text:span text:style-name="T24">1]<text:line-break/></text:span><text:span text:style-name="T26">print("Embeddings Shape:", embeddings.shape)<text:line-break/></text:span><text:span text:style-name="T27">torch.Size([1, 240, 1152])</text:span><text:span text:style-name="T28"><text:line-break/></text:span><text:span text:style-name="T24">protein_representation </text:span><text:span text:style-name="T25">=</text:span><text:span text:style-name="T24"> embeddings.mean(dim</text:span><text:span text:style-name="T25">=</text:span><text:span text:style-name="T24">1)<text:line-break/></text:span><text:span text:style-name="T26">print("Protein Vector Shape:", protein_representation.shape)<text:line-break/></text:span><text:span text:style-name="T27">torch.Size([1, 1152])</text:span></text:p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 Nazanin" svg:font-family="'B Nazanin'" style:font-pitch="variable"/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6T15:12:44.842834240</meta:creation-date>
    <dc:date>2026-06-01T15:15:11.430069070</dc:date>
    <meta:editing-duration>PT51M33S</meta:editing-duration>
    <meta:editing-cycles>14</meta:editing-cycles>
    <meta:generator>LibreOffice/26.2.3.2$Linux_X86_64 LibreOffice_project/70e089b17412e4cb7773e41413306b17a2328c34</meta:generator>
    <meta:document-statistic meta:table-count="0" meta:image-count="0" meta:object-count="0" meta:page-count="3" meta:paragraph-count="46" meta:word-count="473" meta:character-count="3859" meta:non-whitespace-character-count="3417"/>
  </office:meta>
</office:document-meta>
</file>